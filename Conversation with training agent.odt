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Quotations">
      <style:paragraph-properties fo:margin-left="0.4354in" fo:margin-right="0.4354in" fo:margin-top="0.0417in" fo:margin-bottom="0.0417in" style:contextual-spacing="false" fo:text-indent="0in" style:auto-text-indent="false" fo:padding-left="0.1252in" fo:padding-right="0in" fo:padding-top="0in" fo:padding-bottom="0in" fo:border-left="3pt solid #dddddd" fo:border-right="none" fo:border-top="none" fo:border-bottom="none"/>
      <style:text-properties fo:color="#616061" loext:opacity="100%"/>
    </style:style>
    <style:style style:name="P2" style:family="paragraph" style:parent-style-name="Standard">
      <style:paragraph-properties fo:margin-left="0in" fo:margin-right="0in" fo:text-indent="0in" style:auto-text-indent="false"/>
      <style:text-properties fo:color="#1d1c1d" loext:opacity="100%"/>
    </style:style>
    <style:style style:name="P3" style:family="paragraph" style:parent-style-name="Standard">
      <style:paragraph-properties fo:margin-left="0.0417in" fo:margin-right="0.0417in" fo:margin-top="0.0417in" fo:margin-bottom="0.0417in" style:contextual-spacing="false" fo:text-indent="0in" style:auto-text-indent="false"/>
      <style:text-properties fo:color="#1d1c1d" loext:opacity="100%"/>
    </style:style>
    <style:style style:name="T1" style:family="text">
      <style:text-properties fo:font-weight="bol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core feature I’m building today is the <text:span text:style-name="T1">Booking Quality Score</text:span>. It will take hotel booking data and show whether demand is reliable or risky based on booking channel, lead time, cancellation status, and revenue impact. The goal is to get the happy path working: upload data, calculate the score, and show a simple recommendation.</text:p>
      <text:section text:style-name="Sect1" text:name="message-list_1782665281.077969">
        <text:p text:style-name="P2">Chris W  [12:48 PM]</text:p>
        <text:p text:style-name="P3">Morning build block. Goal: your core feature working before lunch. Focus on the happy path — don't get distracted by edge cases or polish.<text:line-break/>Your goal: Complete the task objectives.<text:line-break/>Note: This task has no deliverable and won't count toward weekly feedback — use this time to build and ask me anything!<text:line-break/>Question 1: What is the core feature you're building today?<text:line-break/>C<text:line-break/>The core feature I’m building today is the Booking Quality Score. It will take hotel booking data and show whether demand is reliable or risky based on booking channel, lead time, cancellation status, and revenue impact. The goal is to get the happy path working: upload data, calculate the score, and show a simple recommendation.<text:line-break/>Great clarity! Upload → calculate → recommend. That's a solid happy path.<text:line-break/>Question 2: What does your data pipeline look like — how does the booking data flow from upload to score calculation?<text:line-break/>C<text:line-break/>The data pipeline is: User uploads a hotel booking CSV file → the app parses the file → it pulls only the needed fields like booking channel, lead time, cancellation status, Average Daily Rate (ADR), and revenue fields → the app cleans or normalizes the data → the analysis engine calculates cancellation risk and channel risk → the Booking Quality Score is generated → the dashboard shows the score, risk label, and a plain-English recommendation.<text:line-break/>Solid pipeline! Clear stages from upload to output.<text:line-break/>Question 3: Where are you currently stuck or what's the next piece of code you need to write?<text:line-break/>C<text:line-break/>I'm currently focused on the next code step: connecting the parsed CSV data to the Booking Quality Score calculation. The key piece I need to write next is the function that takes booking channel, lead time, cancellation status, and pricing fields, then returns a score, risk label, and recommendation.<text:line-break/>Good — you've got a clear target.<text:line-break/>What's your initial logic for how those inputs combine into a single score?<text:line-break/>C<text:line-break/>My initial logic is to start every booking at 100 points, then subtract risk points. For example: Booking channel: subtract more points for Online Travel Agency bookings than Direct bookings. Lead time: subtract more points when the booking is far in advance, especially over 180 days. Cancellation history/status: subtract points if similar bookings have a high cancellation rate. Revenue impact: add or protect points if the booking has strong Average Daily Rate (ADR) or Revenue Per Available Room (RevPAR). Then the app labels the result: 80–100 = Low Risk 50–79 = Medium Risk 0–49 = High Risk<text:line-break/>That's a clean, logical scoring model. Start building it!<text:line-break/>Question 4: What's your plan to display the score and recommendation on the dashboard — what does the output look like to the user?<text:line-break/>C<text:line-break/>The dashboard output should be simple and visual. At the top, the user sees a large Booking Quality Score, for example 72 / 100 — Medium Risk. Under that, the app shows the main reason for the score, such as: “Most risk comes from long lead-time Online Travel Agency (OTA) bookings.” Then <text:soft-page-break/>the dashboard shows a short recommendation box, for example: “Encourage more direct bookings, require stronger cancellation terms for long-lead reservations, and monitor high-risk channels before staffing decisions.<text:line-break/>Clean, user-friendly output. Score → reason → action. That's all you need for the happy path.</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29T12:10:30.395689400</meta:creation-date>
    <dc:date>2026-06-29T12:12:40.276110300</dc:date>
    <meta:editing-duration>PT2M10S</meta:editing-duration>
    <meta:editing-cycles>1</meta:editing-cycles>
    <meta:document-statistic meta:table-count="0" meta:image-count="0" meta:object-count="0" meta:page-count="2" meta:paragraph-count="3" meta:word-count="606" meta:character-count="3638" meta:non-whitespace-character-count="3031"/>
    <meta:generator>LibreOffice/26.2.4.2$Windows_X86_64 LibreOffice_project/0229ac93fcf0d7cbc6376066c6f35021cef002dc</meta:generator>
  </office:meta>
</office:document-meta>
</file>